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f0b" officeooo:paragraph-rsid="00173f0b"/>
    </style:style>
    <style:style style:name="P2" style:family="paragraph" style:parent-style-name="Standard">
      <style:text-properties officeooo:rsid="00173f0b" officeooo:paragraph-rsid="001916b3"/>
    </style:style>
    <style:style style:name="P3" style:family="paragraph" style:parent-style-name="Standard">
      <style:text-properties officeooo:rsid="00173f0b" officeooo:paragraph-rsid="001b0129"/>
    </style:style>
    <style:style style:name="P4" style:family="paragraph" style:parent-style-name="Standard">
      <style:text-properties officeooo:rsid="00173f0b" officeooo:paragraph-rsid="00202922"/>
    </style:style>
    <style:style style:name="P5" style:family="paragraph" style:parent-style-name="Standard">
      <style:text-properties officeooo:rsid="00202922" officeooo:paragraph-rsid="00202922"/>
    </style:style>
    <style:style style:name="T1" style:family="text">
      <style:text-properties officeooo:rsid="001916b3"/>
    </style:style>
    <style:style style:name="T2" style:family="text">
      <style:text-properties officeooo:rsid="001b0129"/>
    </style:style>
    <style:style style:name="T3" style:family="text">
      <style:text-properties officeooo:rsid="001c6037"/>
    </style:style>
    <style:style style:name="T4" style:family="text">
      <style:text-properties officeooo:rsid="00202922"/>
    </style:style>
    <style:style style:name="T5" style:family="text">
      <style:text-properties officeooo:rsid="002345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1. Análisis y normalización</text:p>
      <text:p text:style-name="P1">Estructura inicial.</text:p>
      <text:p text:style-name="P1">Tenemos una tabla sencilla de excel desorganizada con datos relevantes probablemente de la <text:span text:style-name="T3">comercializacion y distribucion (compra/venta)</text:span> de distintos productos ferreteros realizados a distintos proveedores en distintas ciudades. </text:p>
      <text:p text:style-name="P1"/>
      <text:p text:style-name="P1">Problemas identificados.</text:p>
      <text:p text:style-name="P3">La tabla inicial presenta multiples falencias que la vuelven una bd poco eficiente, primero presenta duplicidad y redundancia en cuanto a sus datos por ejemplo, existen dos tablas (supplier_city y warehouse_city) que representan la misma información, nombres de ciudades, segundo datos escritos de distinta manera que representan lo mismo como es el caso en la tabla supplierName, el mismo proveedor escrito de manera distinta de igual manera pasa en la tabla de las ciudades, productos y categorias, <text:span text:style-name="T2">puede ser o no visto como un problema porque naturalmente el precio de los productos puede cambiar pero cabe resaltar que la </text:span><text:span text:style-name="T1">información de precios </text:span><text:span text:style-name="T2">unitarios del mismo proveedor no es</text:span><text:span text:style-name="T1"> consistente, </text:span><text:span text:style-name="T2">fluctua mucho en periodos muy cortos. </text:span><text:span text:style-name="T5">Se logran identificar las siguientes entidades</text:span></text:p>
      <text:p text:style-name="P1"/>
      <text:p text:style-name="P1"/>
      <text:p text:style-name="P1">Transformaciones realizadas.</text:p>
      <text:p text:style-name="P1">POSIBLES ENTIDADES</text:p>
      <text:p text:style-name="P1">• <text:span text:style-name="T1">riwi_</text:span><text:span text:style-name="T4">categories</text:span>.</text:p>
      <text:p text:style-name="P1">• <text:span text:style-name="T1">riwi_products</text:span>.</text:p>
      <text:p text:style-name="P1">• <text:span text:style-name="T1">riwi_</text:span><text:span text:style-name="T4">cities</text:span>.</text:p>
      <text:p text:style-name="P4">• <text:span text:style-name="T1">riwi_warehouses_sites </text:span>.</text:p>
      <text:p text:style-name="P1">• riwi_warehouses_cities</text:p>
      <text:p text:style-name="P2">• <text:span text:style-name="T1">riwi_suppliers</text:span></text:p>
      <text:p text:style-name="P4">•riwi_suppliers_cities</text:p>
      <text:p text:style-name="P4">•riwi_purchase_order</text:p>
      <text:p text:style-name="P4">•riwi_purchase_details</text:p>
      <text:p text:style-name="P1"/>
      <text:p text:style-name="P1"/>
      <text:p text:style-name="P1"/>
      <text:p text:style-name="P5">Resultado final normalizado</text:p>
      <text:p text:style-name="P5">Se consigue una DB totalmente normalizada con 9 entidades, donde cada dato pertenece a una única celda (atomicidad de la información), se crearon entidades y otras se unificaron en una sola para evitar redundancia en la información y de una vez se evitaron las dependencias parciales al distribuir los atributos en distintas tablas donde dependa directamente de la llave primaria de esa entida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6T06:33:16.947485497</meta:creation-date>
    <dc:date>2026-07-06T10:53:55.852896066</dc:date>
    <meta:editing-duration>PT10M46S</meta:editing-duration>
    <meta:editing-cycles>2</meta:editing-cycles>
    <meta:generator>LibreOffice/24.2.7.2$Linux_X86_64 LibreOffice_project/420$Build-2</meta:generator>
    <meta:document-statistic meta:table-count="0" meta:image-count="0" meta:object-count="0" meta:page-count="2" meta:paragraph-count="18" meta:word-count="244" meta:character-count="1728" meta:non-whitespace-character-count="1501"/>
  </office:meta>
</office:document-meta>
</file>